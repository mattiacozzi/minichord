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2.02cm"/>
    </style:style>
    <style:style style:name="co3" style:family="table-column">
      <style:table-column-properties fo:break-before="auto" style:column-width="2.7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9.94cm" svg:y="1.009cm">
            <draw:object draw:notify-on-update-of-ranges="Sheet1.A7:Sheet1.A18 Sheet1.B7:Sheet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4.773cm" svg:y="12.644cm">
            <draw:object draw:notify-on-update-of-ranges="Sheet1.A7:Sheet1.A18 Sheet1.C7:Sheet1.C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12 resistenze da 220 ohm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ttoni premuti</text:p>
          </table:table-cell>
          <table:table-cell office:value-type="string" calcext:value-type="string">
            <text:p>Valore plot</text:p>
          </table:table-cell>
          <table:table-cell office:value-type="string" calcext:value-type="string">
            <text:p>Monitor seri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23-[.C6]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23-[.C7]" office:value-type="float" office:value="1005" calcext:value-type="float">
            <text:p>10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23-[.C8]" office:value-type="float" office:value="503" calcext:value-type="float">
            <text:p>50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23-[.C9]" office:value-type="float" office:value="336" calcext:value-type="float">
            <text:p>33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23-[.C10]" office:value-type="float" office:value="252" calcext:value-type="float">
            <text:p>25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23-[.C11]" office:value-type="float" office:value="202" calcext:value-type="float">
            <text:p>202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23-[.C12]" office:value-type="float" office:value="168" calcext:value-type="float">
            <text:p>168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23-[.C13]" office:value-type="float" office:value="144" calcext:value-type="float">
            <text:p>14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23-[.C14]" office:value-type="float" office:value="126" calcext:value-type="float">
            <text:p>126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23-[.C15]" office:value-type="float" office:value="112" calcext:value-type="float">
            <text:p>112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23-[.C16]" office:value-type="float" office:value="101" calcext:value-type="float">
            <text:p>101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23-[.C17]" office:value-type="float" office:value="91" calcext:value-type="float">
            <text:p>91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23-[.C18]" office:value-type="float" office:value="84" calcext:value-type="float">
            <text:p>84</text:p>
          </table:table-cell>
          <table:table-cell office:value-type="float" office:value="939" calcext:value-type="float">
            <text:p>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2:24:43.022354621</meta:creation-date>
    <dc:date>2023-08-29T12:50:50.736961942</dc:date>
    <meta:editing-duration>PT1M37S</meta:editing-duration>
    <meta:editing-cycles>1</meta:editing-cycles>
    <meta:document-statistic meta:table-count="1" meta:cell-count="43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draw:stroke="dash" draw:stroke-dash="Dot" svg:stroke-width="0.05cm"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076cm" svg:y="3.955cm" style:legend-expansion="high" chart:style-name="ch2"/>
        <chart:plot-area chart:style-name="ch3" table:cell-range-address="Sheet1.A7:Sheet1.B18" svg:x="0.319cm" svg:y="0.18cm" svg:width="10.438cm" svg:height="8.646cm">
          <chart:coordinate-region svg:x="1.311cm" svg:y="0.38cm" svg:width="9.259cm" svg:height="7.799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B7:Sheet1.B18" chart:class="chart:scatter">
            <chart:domain table:cell-range-address="Sheet1.A7:Sheet1.A18"/>
            <chart:regression-curve chart:style-name="ch8">
              <chart:equation chart:display-equation="true" chart:display-r-square="false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:Sheet1.A18</svg:desc>
                </draw:g>
              </table:table-cell>
              <table:table-cell office:value-type="float" office:value="1005">
                <text:p>1005</text:p>
                <draw:g>
                  <svg:desc>Sheet1.B7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7" chart:regression-force-intercept="false" chart:regression-intercept-value="0" chart:regression-period="2" loext:regression-extrapolate-forward="0" loext:regression-extrapolate-backward="0" chart:regression-type="polynomial"/>
      <style:graphic-properties draw:stroke="dash" draw:stroke-dash="Dot" svg:stroke-width="0.1cm"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335cm" svg:y="3.955cm" style:legend-expansion="high" chart:style-name="ch2"/>
        <chart:plot-area chart:style-name="ch3" table:cell-range-address="Sheet1.A7:Sheet1.A18 Sheet1.C7:Sheet1.C18" svg:x="0.319cm" svg:y="0.18cm" svg:width="9.697cm" svg:height="8.646cm">
          <chart:coordinate-region svg:x="1.311cm" svg:y="0.38cm" svg:width="8.518cm" svg:height="7.799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C7:Sheet1.C18" chart:class="chart:scatter">
            <chart:domain table:cell-range-address="Sheet1.A7:Sheet1.A18"/>
            <chart:regression-curve chart:style-name="ch8">
              <chart:equation chart:display-equation="true" chart:display-r-square="false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:Sheet1.A18</svg:desc>
                </draw:g>
              </table:table-cell>
              <table:table-cell office:value-type="float" office:value="18">
                <text:p>18</text:p>
                <draw:g>
                  <svg:desc>Sheet1.C7:Sheet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39">
                <text:p>9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</office:styles>
</office:document-styles>
</file>